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Apple Color Emoji" svg:font-family="Apple Color Emoji" style:font-family-generic="system" style:font-pitch="variable"/>
    <style:font-face style:name="Hiragino Sans W4" svg:font-family="Hiragino Sans W4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pple Color Emoji" style:font-name-complex="Apple Color Emoji"/>
    </style:style>
    <style:style style:name="T3" style:parent-style-name="DefaultParagraphFont" style:family="text">
      <style:text-properties style:font-name="Apple Color Emoji" style:font-name-complex="Apple Color Emoji"/>
    </style:style>
    <style:style style:name="T4" style:parent-style-name="DefaultParagraphFont" style:family="text">
      <style:text-properties style:font-name="Apple Color Emoji" style:font-name-complex="Apple Color Emoji"/>
    </style:style>
    <style:style style:name="T5" style:parent-style-name="DefaultParagraphFont" style:family="text">
      <style:text-properties style:font-name="Hiragino Sans W4" style:font-name-asian="Hiragino Sans W4" style:font-name-complex="Hiragino Sans W4"/>
    </style:style>
    <style:style style:name="T6" style:parent-style-name="DefaultParagraphFont" style:family="text">
      <style:text-properties style:font-name="Hiragino Sans W4" style:font-name-asian="Hiragino Sans W4" style:font-name-complex="Hiragino Sans W4"/>
    </style:style>
    <style:style style:name="T7" style:parent-style-name="DefaultParagraphFont" style:family="text">
      <style:text-properties style:font-name="Hiragino Sans W4" style:font-name-asian="Hiragino Sans W4" style:font-name-complex="Hiragino Sans W4"/>
    </style:style>
    <style:style style:name="T8" style:parent-style-name="DefaultParagraphFont" style:family="text">
      <style:text-properties style:font-name="Hiragino Sans W4" style:font-name-asian="Hiragino Sans W4" style:font-name-complex="Hiragino Sans W4"/>
    </style:style>
    <style:style style:name="T9" style:parent-style-name="DefaultParagraphFont" style:family="text">
      <style:text-properties style:font-name="Hiragino Sans W4" style:font-name-asian="Hiragino Sans W4" style:font-name-complex="Hiragino Sans W4"/>
    </style:style>
    <style:style style:name="T10" style:parent-style-name="DefaultParagraphFont" style:family="text">
      <style:text-properties style:font-name="Hiragino Sans W4" style:font-name-asian="Hiragino Sans W4" style:font-name-complex="Hiragino Sans W4"/>
    </style:style>
    <style:style style:name="T11" style:parent-style-name="DefaultParagraphFont" style:family="text">
      <style:text-properties style:font-name="Hiragino Sans W4" style:font-name-asian="Hiragino Sans W4" style:font-name-complex="Hiragino Sans W4"/>
    </style:style>
    <style:style style:name="T12" style:parent-style-name="DefaultParagraphFont" style:family="text">
      <style:text-properties style:font-name="Hiragino Sans W4" style:font-name-asian="Hiragino Sans W4" style:font-name-complex="Hiragino Sans W4"/>
    </style:style>
    <style:style style:name="T13" style:parent-style-name="DefaultParagraphFont" style:family="text">
      <style:text-properties style:font-name="Hiragino Sans W4" style:font-name-asian="Hiragino Sans W4" style:font-name-complex="Hiragino Sans W4"/>
    </style:style>
    <style:style style:name="T14" style:parent-style-name="DefaultParagraphFont" style:family="text">
      <style:text-properties style:font-name="Hiragino Sans W4" style:font-name-asian="Hiragino Sans W4" style:font-name-complex="Hiragino Sans W4"/>
    </style:style>
    <style:style style:name="T15" style:parent-style-name="DefaultParagraphFont" style:family="text">
      <style:text-properties style:font-name="Hiragino Sans W4" style:font-name-asian="Hiragino Sans W4" style:font-name-complex="Hiragino Sans W4"/>
    </style:style>
    <style:style style:name="T16" style:parent-style-name="DefaultParagraphFont" style:family="text">
      <style:text-properties style:font-name="Hiragino Sans W4" style:font-name-asian="Hiragino Sans W4" style:font-name-complex="Hiragino Sans W4"/>
    </style:style>
    <style:style style:name="T17" style:parent-style-name="DefaultParagraphFont" style:family="text">
      <style:text-properties style:font-name="Hiragino Sans W4" style:font-name-asian="Hiragino Sans W4" style:font-name-complex="Hiragino Sans W4"/>
    </style:style>
    <style:style style:name="T18" style:parent-style-name="DefaultParagraphFont" style:family="text">
      <style:text-properties style:font-name="Hiragino Sans W4" style:font-name-asian="Hiragino Sans W4" style:font-name-complex="Hiragino Sans W4"/>
    </style:style>
    <style:style style:name="T19" style:parent-style-name="DefaultParagraphFont" style:family="text">
      <style:text-properties style:font-name="Hiragino Sans W4" style:font-name-asian="Hiragino Sans W4" style:font-name-complex="Hiragino Sans W4"/>
    </style:style>
    <style:style style:name="T20" style:parent-style-name="DefaultParagraphFont" style:family="text">
      <style:text-properties style:font-name="Hiragino Sans W4" style:font-name-asian="Hiragino Sans W4" style:font-name-complex="Hiragino Sans W4"/>
    </style:style>
    <style:style style:name="T21" style:parent-style-name="DefaultParagraphFont" style:family="text">
      <style:text-properties style:font-name="Hiragino Sans W4" style:font-name-asian="Hiragino Sans W4" style:font-name-complex="Hiragino Sans W4"/>
    </style:style>
    <style:style style:name="T22" style:parent-style-name="DefaultParagraphFont" style:family="text">
      <style:text-properties style:font-name="Hiragino Sans W4" style:font-name-asian="Hiragino Sans W4" style:font-name-complex="Hiragino Sans W4"/>
    </style:style>
    <style:style style:name="T23" style:parent-style-name="DefaultParagraphFont" style:family="text">
      <style:text-properties style:font-name="Hiragino Sans W4" style:font-name-asian="Hiragino Sans W4" style:font-name-complex="Hiragino Sans W4"/>
    </style:style>
    <style:style style:name="T24" style:parent-style-name="DefaultParagraphFont" style:family="text">
      <style:text-properties style:font-name="Hiragino Sans W4" style:font-name-asian="Hiragino Sans W4" style:font-name-complex="Hiragino Sans W4"/>
    </style:style>
    <style:style style:name="T25" style:parent-style-name="DefaultParagraphFont" style:family="text">
      <style:text-properties style:font-name="Hiragino Sans W4" style:font-name-asian="Hiragino Sans W4" style:font-name-complex="Hiragino Sans W4"/>
    </style:style>
    <style:style style:name="T26" style:parent-style-name="DefaultParagraphFont" style:family="text">
      <style:text-properties style:font-name="Hiragino Sans W4" style:font-name-asian="Hiragino Sans W4" style:font-name-complex="Hiragino Sans W4"/>
    </style:style>
    <style:style style:name="T27" style:parent-style-name="DefaultParagraphFont" style:family="text">
      <style:text-properties style:font-name="Hiragino Sans W4" style:font-name-asian="Hiragino Sans W4" style:font-name-complex="Hiragino Sans W4"/>
    </style:style>
    <style:style style:name="T28" style:parent-style-name="DefaultParagraphFont" style:family="text">
      <style:text-properties style:font-name="Hiragino Sans W4" style:font-name-asian="Hiragino Sans W4" style:font-name-complex="Hiragino Sans W4"/>
    </style:style>
    <style:style style:name="T29" style:parent-style-name="DefaultParagraphFont" style:family="text">
      <style:text-properties style:font-name="Hiragino Sans W4" style:font-name-asian="Hiragino Sans W4" style:font-name-complex="Hiragino Sans W4"/>
    </style:style>
    <style:style style:name="T30" style:parent-style-name="DefaultParagraphFont" style:family="text">
      <style:text-properties style:font-name="Hiragino Sans W4" style:font-name-asian="Hiragino Sans W4" style:font-name-complex="Hiragino Sans W4"/>
    </style:style>
    <style:style style:name="T31" style:parent-style-name="DefaultParagraphFont" style:family="text">
      <style:text-properties style:font-name="Hiragino Sans W4" style:font-name-asian="Hiragino Sans W4" style:font-name-complex="Hiragino Sans W4"/>
    </style:style>
    <style:style style:name="T32" style:parent-style-name="DefaultParagraphFont" style:family="text">
      <style:text-properties style:font-name="Hiragino Sans W4" style:font-name-asian="Hiragino Sans W4" style:font-name-complex="Hiragino Sans W4"/>
    </style:style>
  </office:automatic-styles>
  <office:body>
    <office:text text:use-soft-page-breaks="true">
      <text:p text:style-name="P1">&lt;!DOCTYPE html&gt;</text:p>
      <text:p text:style-name="Normal">&lt;html lang="ru"&gt;</text:p>
      <text:p text:style-name="Normal">&lt;head&gt;</text:p>
      <text:p text:style-name="Normal">&lt;meta charset="UTF-8"&gt;</text:p>
      <text:p text:style-name="Normal">&lt;meta name="viewport" content="width=device-width, initial-scale=1.0"&gt;</text:p>
      <text:p text:style-name="Normal"/>
      <text:p text:style-name="Normal">&lt;title&gt;HSK Pronunciation Trainer&lt;/title&gt;</text:p>
      <text:p text:style-name="Normal"/>
      <text:p text:style-name="Normal">&lt;style&gt;</text:p>
      <text:p text:style-name="Normal"/>
      <text:p text:style-name="Normal">body{</text:p>
      <text:p text:style-name="Normal">margin:0;</text:p>
      <text:p text:style-name="Normal">font-family:Arial,sans-serif;</text:p>
      <text:p text:style-name="Normal">background:linear-gradient(135deg,#f6f9ff,#dfe9ff);</text:p>
      <text:p text:style-name="Normal">display:flex;</text:p>
      <text:p text:style-name="Normal">justify-content:center;</text:p>
      <text:p text:style-name="Normal">align-items:center;</text:p>
      <text:p text:style-name="Normal">height:100vh;</text:p>
      <text:p text:style-name="Normal">}</text:p>
      <text:p text:style-name="Normal"/>
      <text:p text:style-name="Normal">.container{</text:p>
      <text:p text:style-name="Normal">width:420px;</text:p>
      <text:p text:style-name="Normal">background:white;</text:p>
      <text:p text:style-name="Normal">padding:25px;</text:p>
      <text:p text:style-name="Normal">border-radius:20px;</text:p>
      <text:p text:style-name="Normal">box-shadow:0 15px 40px rgba(0,0,0,.15);</text:p>
      <text:p text:style-name="Normal">text-align:center;</text:p>
      <text:p text:style-name="Normal">}</text:p>
      <text:p text:style-name="Normal"/>
      <text:p text:style-name="Normal">h1{</text:p>
      <text:p text:style-name="Normal">margin-top:0;</text:p>
      <text:p text:style-name="Normal">color:#3f51b5;</text:p>
      <text:p text:style-name="Normal">}</text:p>
      <text:p text:style-name="Normal"/>
      <text:p text:style-name="Normal">select{</text:p>
      <text:p text:style-name="Normal">padding:10px;</text:p>
      <text:p text:style-name="Normal">border-radius:10px;</text:p>
      <text:p text:style-name="Normal">font-size:16px;</text:p>
      <text:p text:style-name="Normal">margin-bottom:20px;</text:p>
      <text:p text:style-name="Normal">}</text:p>
      <text:p text:style-name="Normal"/>
      <text:p text:style-name="Normal">.word{</text:p>
      <text:p text:style-name="Normal">font-size:64px;</text:p>
      <text:p text:style-name="Normal">font-weight:bold;</text:p>
      <text:p text:style-name="Normal">margin:20px 0;</text:p>
      <text:p text:style-name="Normal">}</text:p>
      <text:p text:style-name="Normal"/>
      <text:p text:style-name="Normal">.pinyin{</text:p>
      <text:p text:style-name="Normal">font-size:28px;</text:p>
      <text:p text:style-name="Normal">color:#444;</text:p>
      <text:p text:style-name="Normal">margin-bottom:10px;</text:p>
      <text:p text:style-name="Normal">}</text:p>
      <text:p text:style-name="Normal"/>
      <text:p text:style-name="Normal">.translation{</text:p>
      <text:p text:style-name="Normal">font-size:22px;</text:p>
      <text:p text:style-name="Normal">color:#666;</text:p>
      <text:p text:style-name="Normal">margin-bottom:20px;</text:p>
      <text:p text:style-name="Normal">}</text:p>
      <text:p text:style-name="Normal"/>
      <text:p text:style-name="Normal">button{</text:p>
      <text:p text:style-name="Normal">padding:12px 18px;</text:p>
      <text:p text:style-name="Normal">margin:5px;</text:p>
      <text:p text:style-name="Normal">border:none;</text:p>
      <text:p text:style-name="Normal">border-radius:10px;</text:p>
      <text:p text:style-name="Normal">background:#3f51b5;</text:p>
      <text:p text:style-name="Normal">color:white;</text:p>
      <text:p text:style-name="Normal">font-size:16px;</text:p>
      <text:p text:style-name="Normal">cursor:pointer;</text:p>
      <text:p text:style-name="Normal">}</text:p>
      <text:p text:style-name="Normal"/>
      <text:p text:style-name="Normal">button:hover{</text:p>
      <text:p text:style-name="Normal">background:#283593;</text:p>
      <text:p text:style-name="Normal">}</text:p>
      <text:p text:style-name="Normal"/>
      <text:p text:style-name="Normal">.small{</text:p>
      <text:p text:style-name="Normal">background:#8e99f3;</text:p>
      <text:p text:style-name="Normal">}</text:p>
      <text:p text:style-name="Normal"/>
      <text:p text:style-name="Normal">.hidden{</text:p>
      <text:p text:style-name="Normal">visibility:hidden;</text:p>
      <text:p text:style-name="Normal">}</text:p>
      <text:p text:style-name="Normal"/>
      <text:p text:style-name="Normal">&lt;/style&gt;</text:p>
      <text:p text:style-name="Normal"/>
      <text:p text:style-name="Normal">&lt;/head&gt;</text:p>
      <text:p text:style-name="Normal">&lt;body&gt;</text:p>
      <text:p text:style-name="Normal"/>
      <text:p text:style-name="Normal">&lt;div class="container"&gt;</text:p>
      <text:p text:style-name="Normal"/>
      <text:p text:style-name="Normal">&lt;h1&gt;HSK Pronunciation&lt;/h1&gt;</text:p>
      <text:p text:style-name="Normal"/>
      <text:p text:style-name="Normal">&lt;select id="level"&gt;</text:p>
      <text:p text:style-name="Normal">&lt;option value="1"&gt;HSK 1&lt;/option&gt;</text:p>
      <text:p text:style-name="Normal">&lt;option value="2"&gt;HSK 2&lt;/option&gt;</text:p>
      <text:p text:style-name="Normal">&lt;option value="3"&gt;HSK 3&lt;/option&gt;</text:p>
      <text:p text:style-name="Normal">&lt;option value="4"&gt;HSK 4&lt;/option&gt;</text:p>
      <text:p text:style-name="Normal">&lt;/select&gt;</text:p>
      <text:p text:style-name="Normal"/>
      <text:p text:style-name="Normal">&lt;div class="word" id="word"&gt;&lt;/div&gt;</text:p>
      <text:p text:style-name="Normal">&lt;div class="pinyin" id="pinyin"&gt;&lt;/div&gt;</text:p>
      <text:p text:style-name="Normal">&lt;div class="translation" id="translation"&gt;&lt;/div&gt;</text:p>
      <text:p text:style-name="Normal"/>
      <text:p text:style-name="Normal">&lt;button onclick="speak()"&gt;<text:span text:style-name="T2">🔊</text:span><text:s/>Произнести&lt;/button&gt;</text:p>
      <text:p text:style-name="Normal"/>
      <text:p text:style-name="Normal">&lt;br&gt;&lt;br&gt;</text:p>
      <text:p text:style-name="Normal"/>
      <text:p text:style-name="Normal">&lt;button onclick="prevWord()"&gt;<text:span text:style-name="T3">⬅</text:span>&lt;/button&gt;</text:p>
      <text:p text:style-name="Normal">&lt;button onclick="nextWord()"&gt;<text:span text:style-name="T4">➡</text:span>&lt;/button&gt;</text:p>
      <text:p text:style-name="Normal"/>
      <text:p text:style-name="Normal">&lt;br&gt;&lt;br&gt;</text:p>
      <text:p text:style-name="Normal"/>
      <text:p text:style-name="Normal">&lt;button class="small" onclick="togglePinyin()"&gt;Пиньинь&lt;/button&gt;</text:p>
      <text:p text:style-name="Normal">&lt;button class="small" onclick="toggleTranslation()"&gt;Перевод&lt;/button&gt;</text:p>
      <text:p text:style-name="Normal">&lt;button class="small" onclick="shuffle()"&gt;Перемешать&lt;/button&gt;</text:p>
      <text:p text:style-name="Normal"/>
      <text:p text:style-name="Normal">&lt;/div&gt;</text:p>
      <text:p text:style-name="Normal"/>
      <text:p text:style-name="Normal">&lt;script&gt;</text:p>
      <text:p text:style-name="Normal"/>
      <text:p text:style-name="Normal">const words={</text:p>
      <text:p text:style-name="Normal"/>
      <text:p text:style-name="Normal">1:[</text:p>
      <text:p text:style-name="Normal">{c:"<text:span text:style-name="T5">你好</text:span>",p:"nǐ hǎo",r:"Привет"},</text:p>
      <text:p text:style-name="Normal">{c:"谢谢",p:"xièxie",r:"Спасибо"},</text:p>
      <text:p text:style-name="Normal">{c:"<text:span text:style-name="T6">再</text:span>见",p:"zàijiàn",r:"До свидания"},</text:p>
      <text:p text:style-name="Normal">{c:"<text:span text:style-name="T7">中国</text:span>",p:"Zhōngguó",r:"Китай"},</text:p>
      <text:p text:style-name="Normal">{c:"<text:span text:style-name="T8">人</text:span>",p:"rén",r:"Человек"},</text:p>
      <text:p text:style-name="Normal">{c:"<text:span text:style-name="T9">水</text:span>",p:"shuǐ",r:"Вода"},</text:p>
      <text:p text:style-name="Normal">{c:"<text:span text:style-name="T10">茶</text:span>",p:"chá",r:"Чай"},</text:p>
      <text:p text:style-name="Normal">{c:"<text:span text:style-name="T11">学校</text:span>",p:"xuéxiào",r:"Школа"},</text:p>
      <text:p text:style-name="Normal">{c:"<text:span text:style-name="T12">老</text:span>师",p:"lǎoshī",r:"Учитель"},</text:p>
      <text:p text:style-name="Normal">{c:"<text:span text:style-name="T13">学生</text:span>",p:"xuésheng",r:"Студент"}</text:p>
      <text:p text:style-name="Normal">],</text:p>
      <text:p text:style-name="Normal"/>
      <text:p text:style-name="Normal">2:[</text:p>
      <text:p text:style-name="Normal">{c:"<text:span text:style-name="T14">朋友</text:span>",p:"péngyou",r:"Друг"},</text:p>
      <text:p text:style-name="Normal">{c:"<text:span text:style-name="T15">医院</text:span>",p:"yīyuàn",r:"Больница"},</text:p>
      <text:p text:style-name="Normal">{c:"飞<text:span text:style-name="T16">机</text:span>",p:"fēijī",r:"Самолёт"},</text:p>
      <text:p text:style-name="Normal">{c:"时间",p:"shíjiān",r:"Время"},</text:p>
      <text:p text:style-name="Normal">{c:"<text:span text:style-name="T17">工作</text:span>",p:"gōngzuò",r:"Работа"},</text:p>
      <text:p text:style-name="Normal">{c:"<text:span text:style-name="T18">因</text:span>为",p:"yīnwèi",r:"Потому что"},</text:p>
      <text:p text:style-name="Normal">{c:"<text:span text:style-name="T19">帮助</text:span>",p:"bāngzhù",r:"Помогать"},</text:p>
      <text:p text:style-name="Normal">{c:"运动",p:"yùndòng",r:"Спорт"}</text:p>
      <text:p text:style-name="Normal">],</text:p>
      <text:p text:style-name="Normal"/>
      <text:p text:style-name="Normal">3:[</text:p>
      <text:p text:style-name="Normal">{c:"<text:span text:style-name="T20">重要</text:span>",p:"zhòngyào",r:"Важный"},</text:p>
      <text:p text:style-name="Normal">{c:"<text:span text:style-name="T21">决定</text:span>",p:"juédìng",r:"Решать"},</text:p>
      <text:p text:style-name="Normal">{c:"<text:span text:style-name="T22">旅行</text:span>",p:"lǚxíng",r:"Путешествие"},</text:p>
      <text:p text:style-name="Normal">{c:"<text:span text:style-name="T23">准</text:span>备",p:"zhǔnbèi",r:"Готовиться"},</text:p>
      <text:p text:style-name="Normal">{c:"历<text:span text:style-name="T24">史</text:span>",p:"lìshǐ",r:"История"},</text:p>
      <text:p text:style-name="Normal">{c:"<text:span text:style-name="T25">文化</text:span>",p:"wénhuà",r:"Культура"},</text:p>
      <text:p text:style-name="Normal">{c:"<text:span text:style-name="T26">城市</text:span>",p:"chéngshì",r:"Город"}</text:p>
      <text:p text:style-name="Normal">],</text:p>
      <text:p text:style-name="Normal"/>
      <text:p text:style-name="Normal">4:[</text:p>
      <text:p text:style-name="Normal">{c:"经验",p:"jīngyàn",r:"Опыт"},</text:p>
      <text:p text:style-name="Normal">{c:"<text:span text:style-name="T27">成功</text:span>",p:"chénggōng",r:"Успех"},</text:p>
      <text:p text:style-name="Normal">{c:"<text:span text:style-name="T28">理解</text:span>",p:"lǐjiě",r:"Понимать"},</text:p>
      <text:p text:style-name="Normal">{c:"环<text:span text:style-name="T29">境</text:span>",p:"huánjìng",r:"Окружающая среда"},</text:p>
      <text:p text:style-name="Normal">{c:"<text:span text:style-name="T30">提高</text:span>",p:"tígāo",r:"Повышать"},</text:p>
      <text:p text:style-name="Normal">{c:"发<text:span text:style-name="T31">展</text:span>",p:"fāzhǎn",r:"Развитие"},</text:p>
      <text:p text:style-name="Normal">{c:"责<text:span text:style-name="T32">任</text:span>",p:"zérèn",r:"Ответственность"}</text:p>
      <text:p text:style-name="Normal">]</text:p>
      <text:p text:style-name="Normal"/>
      <text:p text:style-name="Normal">};</text:p>
      <text:p text:style-name="Normal"/>
      <text:p text:style-name="Normal">let index=0;</text:p>
      <text:p text:style-name="Normal"/>
      <text:p text:style-name="Normal">let current=words[1];</text:p>
      <text:p text:style-name="Normal"/>
      <text:p text:style-name="Normal">const word=document.getElementById("word");</text:p>
      <text:p text:style-name="Normal">const pinyin=document.getElementById("pinyin");</text:p>
      <text:p text:style-name="Normal">const translation=document.getElementById("translation");</text:p>
      <text:p text:style-name="Normal"/>
      <text:p text:style-name="Normal">function show(){</text:p>
      <text:p text:style-name="Normal">word.textContent=current[index].c;</text:p>
      <text:p text:style-name="Normal">pinyin.textContent=current[index].p;</text:p>
      <text:p text:style-name="Normal">translation.textContent=current[index].r;</text:p>
      <text:p text:style-name="Normal">}</text:p>
      <text:p text:style-name="Normal"/>
      <text:p text:style-name="Normal">document.getElementById("level").onchange=function(){</text:p>
      <text:p text:style-name="Normal">current=[...words[this.value]];</text:p>
      <text:p text:style-name="Normal">index=0;</text:p>
      <text:p text:style-name="Normal">show();</text:p>
      <text:p text:style-name="Normal">}</text:p>
      <text:p text:style-name="Normal"/>
      <text:p text:style-name="Normal">function nextWord(){</text:p>
      <text:p text:style-name="Normal">index=(index+1)%current.length;</text:p>
      <text:p text:style-name="Normal">show();</text:p>
      <text:p text:style-name="Normal">}</text:p>
      <text:p text:style-name="Normal"/>
      <text:p text:style-name="Normal">function prevWord(){</text:p>
      <text:p text:style-name="Normal">index=(index-1+current.length)%current.length;</text:p>
      <text:p text:style-name="Normal">show();</text:p>
      <text:p text:style-name="Normal">}</text:p>
      <text:p text:style-name="Normal"/>
      <text:p text:style-name="Normal">function speak(){</text:p>
      <text:p text:style-name="Normal"/>
      <text:p text:style-name="Normal">let u=new SpeechSynthesisUtterance(current[index].c);</text:p>
      <text:p text:style-name="Normal"/>
      <text:p text:style-name="Normal">u.lang="zh-CN";</text:p>
      <text:p text:style-name="Normal"/>
      <text:p text:style-name="Normal">u.rate=0.8;</text:p>
      <text:p text:style-name="Normal"/>
      <text:p text:style-name="Normal">speechSynthesis.cancel();</text:p>
      <text:p text:style-name="Normal"/>
      <text:p text:style-name="Normal">speechSynthesis.speak(u);</text:p>
      <text:p text:style-name="Normal"/>
      <text:p text:style-name="Normal">}</text:p>
      <text:p text:style-name="Normal"/>
      <text:p text:style-name="Normal">function togglePinyin(){</text:p>
      <text:p text:style-name="Normal">pinyin.classList.toggle("hidden");</text:p>
      <text:p text:style-name="Normal">}</text:p>
      <text:p text:style-name="Normal"/>
      <text:p text:style-name="Normal">function toggleTranslation(){</text:p>
      <text:p text:style-name="Normal">translation.classList.toggle("hidden");</text:p>
      <text:p text:style-name="Normal">}</text:p>
      <text:p text:style-name="Normal"/>
      <text:p text:style-name="Normal">function shuffle(){</text:p>
      <text:p text:style-name="Normal"/>
      <text:p text:style-name="Normal">for(let i=current.length-1;i&gt;0;i--){</text:p>
      <text:p text:style-name="Normal">const j=Math.floor(Math.random()*(i+1));</text:p>
      <text:p text:style-name="Normal">[current[i],current[j]]=[current[j],current[i]];</text:p>
      <text:p text:style-name="Normal">}</text:p>
      <text:p text:style-name="Normal"/>
      <text:p text:style-name="Normal">index=0;</text:p>
      <text:p text:style-name="Normal">show();</text:p>
      <text:p text:style-name="Normal"/>
      <text:p text:style-name="Normal">}</text:p>
      <text:p text:style-name="Normal"/>
      <text:p text:style-name="Normal">show();</text:p>
      <text:p text:style-name="Normal"/>
      <text:p text:style-name="Normal">&lt;/script&gt;</text:p>
      <text:p text:style-name="Normal"/>
      <text:p text:style-name="Normal">&lt;/body&gt;</text:p>
      <text:p text:style-name="Normal">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Apple Color Emoji" svg:font-family="Apple Color Emoji" style:font-family-generic="system" style:font-pitch="variable"/>
    <style:font-face style:name="Hiragino Sans W4" svg:font-family="Hiragino Sans W4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Yu Gothic Light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Yu Gothic Light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ka zamka</meta:initial-creator>
    <dc:creator>mika zamka</dc:creator>
    <meta:creation-date>2026-07-21T18:56:00Z</meta:creation-date>
    <dc:date>2026-07-21T18:56:00Z</dc:date>
    <meta:template xlink:href="Normal.dotm" xlink:type="simple"/>
    <meta:editing-cycles>2</meta:editing-cycles>
    <meta:editing-duration>PT60S</meta:editing-duration>
    <meta:document-statistic meta:page-count="1" meta:paragraph-count="7" meta:word-count="591" meta:character-count="3955" meta:row-count="28" meta:non-whitespace-character-count="3371"/>
  </office:meta>
</office:document-meta>
</file>